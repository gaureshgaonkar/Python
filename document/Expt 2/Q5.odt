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Q5.<text:s/>Write a simple Python program that takes an integer as input, and if the number is divisible by 2, 3 and 5, prints "DIVISIBLE" else it prints "NOT DIVISIBLE</text:p>
      <text:p text:style-name="Normal">Code:</text:p>
      <text:p text:style-name="Normal">num=int(input("Enter value for check if number is divisible by 2,3,5:"))</text:p>
      <text:p text:style-name="Normal">if (num%2==0):</text:p>
      <text:p text:style-name="Normal"><text:s text:c="4"/>if (num%3==0):</text:p>
      <text:p text:style-name="Normal"><text:s text:c="8"/>if (num%5==0):</text:p>
      <text:p text:style-name="Normal"><text:s text:c="12"/>print("DIVISIBLE")</text:p>
      <text:p text:style-name="Normal">else :</text:p>
      <text:p text:style-name="Normal"><text:s text:c="4"/>print("NOT DIVISIBLE")</text:p>
      <text:p text:style-name="Normal"><text:s text:c="12"/></text:p>
      <text:p text:style-name="Normal">output:</text:p>
      <text:p text:style-name="Normal"><draw:frame draw:style-name="a0" draw:name="Picture 1" text:anchor-type="as-char" svg:x="0in" svg:y="0in" svg:width="6.26806in" svg:height="0.4881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1-15T08:10:00Z</meta:creation-date>
    <dc:date>2026-01-15T08:11:00Z</dc:date>
    <meta:template xlink:href="Normal" xlink:type="simple"/>
    <meta:editing-cycles>2</meta:editing-cycles>
    <meta:editing-duration>PT60S</meta:editing-duration>
    <meta:document-statistic meta:page-count="1" meta:paragraph-count="1" meta:word-count="57" meta:character-count="384" meta:row-count="2" meta:non-whitespace-character-count="328"/>
  </office:meta>
</office:document-meta>
</file>