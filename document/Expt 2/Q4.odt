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Q4.<text:s/>Write a simple Python program that takes three numbers (floating point) as input, and prints them all on the same line, starting from the smallest to the largest with a space in between them</text:p>
      <text:p text:style-name="Normal">Code:</text:p>
      <text:p text:style-name="Normal">num1=float(input("Enter float value for num 1 :-"))</text:p>
      <text:p text:style-name="Normal">num2=float(input("Enter float value for num 2 :-"))</text:p>
      <text:p text:style-name="Normal">num3=float(input("Enter float value for num 3 :-"))</text:p>
      <text:p text:style-name="Normal">if num1&gt;num2 and num1&gt;num3:</text:p>
      <text:p text:style-name="Normal"><text:s text:c="4"/>if num2&gt;num1:</text:p>
      <text:p text:style-name="Normal"><text:s text:c="8"/>print(num3,num2,num1)</text:p>
      <text:p text:style-name="Normal"><text:s text:c="4"/>else:</text:p>
      <text:p text:style-name="Normal"><text:s text:c="8"/>print(num2,num3,num1)</text:p>
      <text:p text:style-name="Normal">elif num2&gt;num1 and num2&gt;num3:</text:p>
      <text:p text:style-name="Normal"><text:s text:c="4"/>if num3&gt;num1:</text:p>
      <text:p text:style-name="Normal"><text:s text:c="8"/>print(num1,num3,num2)</text:p>
      <text:p text:style-name="Normal"><text:s text:c="4"/>else:</text:p>
      <text:p text:style-name="Normal"><text:s text:c="8"/>print(num3,num1,num2)</text:p>
      <text:p text:style-name="Normal">else:</text:p>
      <text:p text:style-name="Normal"><text:s text:c="4"/>if num1&gt;num2:</text:p>
      <text:p text:style-name="Normal"><text:s text:c="8"/>print(num2,num1,num3)</text:p>
      <text:p text:style-name="Normal"><text:s text:c="4"/>else :</text:p>
      <text:p text:style-name="Normal"><text:s text:c="8"/>print(num1,num2,num3)</text:p>
      <text:p text:style-name="Normal">output:</text:p>
      <text:p text:style-name="Normal"><draw:frame draw:style-name="a0" draw:name="Picture 1" text:anchor-type="as-char" svg:x="0in" svg:y="0in" svg:width="6.26806in" svg:height="0.87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15T07:56:00Z</meta:creation-date>
    <dc:date>2026-01-15T08:03:00Z</dc:date>
    <meta:template xlink:href="Normal" xlink:type="simple"/>
    <meta:editing-cycles>1</meta:editing-cycles>
    <meta:editing-duration>PT420S</meta:editing-duration>
    <meta:document-statistic meta:page-count="1" meta:paragraph-count="1" meta:word-count="103" meta:character-count="695" meta:row-count="4" meta:non-whitespace-character-count="593"/>
  </office:meta>
</office:document-meta>
</file>