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2.Accept 2 no and found greatest</text:p>
      <text:p text:style-name="Normal">Code:</text:p>
      <text:p text:style-name="Normal">no1=int(input("Enter value for no1:"))</text:p>
      <text:p text:style-name="Normal">no2=int(input("Enter value for no2:"))</text:p>
      <text:p text:style-name="Normal">if no1&gt;no2:</text:p>
      <text:p text:style-name="Normal"><text:s text:c="4"/>print(no1,"No1 is greater")</text:p>
      <text:p text:style-name="Normal">else:</text:p>
      <text:p text:style-name="Normal"><text:s text:c="4"/>print(no2,"No2 is graeter")</text:p>
      <text:p text:style-name="Normal"/>
      <text:p text:style-name="Normal">output:</text:p>
      <text:p text:style-name="Normal"><draw:frame draw:style-name="a0" draw:name="Picture 1" text:anchor-type="as-char" svg:x="0in" svg:y="0in" svg:width="6.26806in" svg:height="1.5548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08T08:07:00Z</meta:creation-date>
    <dc:date>2026-01-08T08:10:00Z</dc:date>
    <meta:template xlink:href="Normal" xlink:type="simple"/>
    <meta:editing-cycles>1</meta:editing-cycles>
    <meta:editing-duration>PT180S</meta:editing-duration>
    <meta:document-statistic meta:page-count="1" meta:paragraph-count="1" meta:word-count="31" meta:character-count="209" meta:row-count="1" meta:non-whitespace-character-count="179"/>
  </office:meta>
</office:document-meta>
</file>