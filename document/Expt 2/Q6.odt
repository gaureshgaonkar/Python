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Q6.<text:s/>Write a Python function called get_largest() that takes two integer numbers n1 and n2 and returns the larger number between the two</text:p>
      <text:p text:style-name="Normal">Code:</text:p>
      <text:p text:style-name="Normal">def get_largest(num1,num2):</text:p>
      <text:p text:style-name="Normal"><text:s text:c="4"/>if num1&gt;num2:</text:p>
      <text:p text:style-name="Normal"><text:s text:c="8"/>print(num1)</text:p>
      <text:p text:style-name="Normal"><text:s text:c="4"/>else:</text:p>
      <text:p text:style-name="Normal"><text:s text:c="8"/>print(num2)</text:p>
      <text:p text:style-name="Normal">num1=int(input("Enter value for num1:"))</text:p>
      <text:p text:style-name="Normal">num2=int(input("Enter value for num2:"))</text:p>
      <text:p text:style-name="Normal">get_largest(num1,num2)</text:p>
      <text:p text:style-name="Normal">output:</text:p>
      <text:p text:style-name="Normal"><draw:frame draw:style-name="a0" draw:name="Picture 1" text:anchor-type="as-char" svg:x="0in" svg:y="0in" svg:width="6.26806in" svg:height="0.53403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uresh Gaonkar</meta:initial-creator>
    <dc:creator>Gauresh Gaonkar</dc:creator>
    <meta:creation-date>2026-01-15T08:12:00Z</meta:creation-date>
    <dc:date>2026-01-15T08:15:00Z</dc:date>
    <meta:template xlink:href="Normal" xlink:type="simple"/>
    <meta:editing-cycles>1</meta:editing-cycles>
    <meta:editing-duration>PT180S</meta:editing-duration>
    <meta:document-statistic meta:page-count="1" meta:paragraph-count="1" meta:word-count="52" meta:character-count="352" meta:row-count="2" meta:non-whitespace-character-count="301"/>
  </office:meta>
</office:document-meta>
</file>