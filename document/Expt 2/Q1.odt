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2</text:p>
      <text:p text:style-name="Normal">1.Print If user is child teen or adult/senior citizen</text:p>
      <text:p text:style-name="Normal">Code :</text:p>
      <text:p text:style-name="Normal">age=int(input("Enter Your age:"))</text:p>
      <text:p text:style-name="Normal">if age&lt;=12:</text:p>
      <text:p text:style-name="Normal"><text:s text:c="4"/>print("Child")</text:p>
      <text:p text:style-name="Normal">elif age&gt;=13 and age&lt;=19:</text:p>
      <text:p text:style-name="Normal"><text:s text:c="4"/>print("Teen")</text:p>
      <text:p text:style-name="Normal">elif age&gt;=20 and age&lt;=65:</text:p>
      <text:p text:style-name="Normal"><text:s text:c="4"/>print("Adult")</text:p>
      <text:p text:style-name="Normal">else:</text:p>
      <text:p text:style-name="Normal"><text:s text:c="4"/>print("Senior Citizen")</text:p>
      <text:p text:style-name="Normal"/>
      <text:p text:style-name="Normal">output:</text:p>
      <text:p text:style-name="Normal"><draw:frame draw:style-name="a0" draw:name="Picture 1" text:anchor-type="as-char" svg:x="0in" svg:y="0in" svg:width="6.26806in" svg:height="3.97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08T07:29:00Z</meta:creation-date>
    <dc:date>2026-01-08T07:33:00Z</dc:date>
    <meta:template xlink:href="Normal" xlink:type="simple"/>
    <meta:editing-cycles>1</meta:editing-cycles>
    <meta:editing-duration>PT240S</meta:editing-duration>
    <meta:document-statistic meta:page-count="1" meta:paragraph-count="1" meta:word-count="40" meta:character-count="272" meta:row-count="1" meta:non-whitespace-character-count="233"/>
  </office:meta>
</office:document-meta>
</file>