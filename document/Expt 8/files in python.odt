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5in">
        <style:tab-stops/>
      </style:paragraph-properties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>
      <style:paragraph-properties>
        <style:tab-stops>
          <style:tab-stop style:type="left" style:position="0.9375in"/>
        </style:tab-stops>
      </style:paragraph-properties>
    </style:style>
    <style:style style:name="P6" style:parent-style-name="Normal" style:family="paragraph">
      <style:paragraph-properties fo:break-before="page"/>
    </style:style>
    <style:style style:name="P7" style:parent-style-name="Normal" style:family="paragraph">
      <style:paragraph-properties>
        <style:tab-stops>
          <style:tab-stop style:type="left" style:position="0.9375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0.9375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0.9375in"/>
        </style:tab-stops>
      </style:paragraph-properties>
    </style:style>
    <style:style style:name="P10" style:parent-style-name="Normal" style:family="paragraph">
      <style:paragraph-properties fo:margin-left="0.9375in">
        <style:tab-stops>
          <style:tab-stop style:type="left" style:position="0in"/>
        </style:tab-stops>
      </style:paragraph-properties>
    </style:style>
    <style:style style:name="P11" style:parent-style-name="Normal" style:family="paragraph">
      <style:paragraph-properties fo:margin-left="0.9375in">
        <style:tab-stops>
          <style:tab-stop style:type="left" style:position="0in"/>
        </style:tab-stops>
      </style:paragraph-properties>
    </style:style>
    <style:style style:name="P12" style:parent-style-name="Normal" style:family="paragraph">
      <style:paragraph-properties fo:margin-left="0.9375in">
        <style:tab-stops>
          <style:tab-stop style:type="left" style:position="0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left" style:position="0.9375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0.9375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2.6145in"/>
        </style:tab-stops>
      </style:paragraph-properties>
    </style:style>
    <style:style style:name="P16" style:parent-style-name="Normal" style:family="paragraph">
      <style:paragraph-properties fo:break-before="page"/>
    </style:style>
    <style:style style:name="P17" style:parent-style-name="Normal" style:family="paragraph">
      <style:paragraph-properties>
        <style:tab-stops>
          <style:tab-stop style:type="left" style:position="2.6145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2.6145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0.6979in"/>
          <style:tab-stop style:type="left" style:position="2.6145in"/>
        </style:tab-stops>
      </style:paragraph-properties>
    </style:style>
    <style:style style:name="P20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P21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P22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0.6979in"/>
          <style:tab-stop style:type="left" style:position="2.6145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0.6979in"/>
          <style:tab-stop style:type="left" style:position="2.6145in"/>
        </style:tab-stops>
      </style:paragraph-properties>
    </style:style>
    <style:style style:name="P25" style:parent-style-name="Normal" style:family="paragraph">
      <style:paragraph-properties fo:break-before="page"/>
    </style:style>
    <style:style style:name="P26" style:parent-style-name="Normal" style:family="paragraph">
      <style:paragraph-properties>
        <style:tab-stops>
          <style:tab-stop style:type="left" style:position="0.6979in"/>
          <style:tab-stop style:type="left" style:position="2.6145in"/>
        </style:tab-stops>
      </style:paragraph-properties>
    </style:style>
    <style:style style:name="P27" style:parent-style-name="Normal" style:family="paragraph">
      <style:paragraph-properties>
        <style:tab-stops>
          <style:tab-stop style:type="left" style:position="0.6979in"/>
          <style:tab-stop style:type="left" style:position="2.6145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left" style:position="0.6979in"/>
          <style:tab-stop style:type="left" style:position="2.6145in"/>
        </style:tab-stops>
      </style:paragraph-properties>
    </style:style>
    <style:style style:name="P29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P30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P31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P32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P33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P34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0.6979in"/>
          <style:tab-stop style:type="left" style:position="2.6145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position="0.6979in"/>
          <style:tab-stop style:type="left" style:position="2.6145in"/>
        </style:tab-stops>
      </style:paragraph-properties>
    </style:style>
    <style:style style:name="P37" style:parent-style-name="Normal" style:family="paragraph">
      <style:paragraph-properties fo:break-before="page"/>
    </style:style>
    <style:style style:name="P38" style:parent-style-name="Normal" style:family="paragraph">
      <style:paragraph-properties>
        <style:tab-stops>
          <style:tab-stop style:type="left" style:position="0.6979in"/>
          <style:tab-stop style:type="left" style:position="2.6145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0.6979in"/>
          <style:tab-stop style:type="left" style:position="2.6145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0.6979in"/>
          <style:tab-stop style:type="left" style:position="2.6145in"/>
        </style:tab-stops>
      </style:paragraph-properties>
    </style:style>
    <style:style style:name="P41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P42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P43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P44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P45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T46" style:parent-style-name="DefaultParagraphFont" style:family="text">
      <style:text-properties style:font-name="Segoe UI Emoji" style:font-name-complex="Segoe UI Emoji"/>
    </style:style>
    <style:style style:name="P47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P48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T49" style:parent-style-name="DefaultParagraphFont" style:family="text">
      <style:text-properties style:font-name="Segoe UI Emoji" style:font-name-complex="Segoe UI Emoji"/>
    </style:style>
    <style:style style:name="P50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P51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T52" style:parent-style-name="DefaultParagraphFont" style:family="text">
      <style:text-properties style:font-name="Segoe UI Emoji" style:font-name-complex="Segoe UI Emoji"/>
    </style:style>
    <style:style style:name="P53" style:parent-style-name="Normal" style:family="paragraph">
      <style:paragraph-properties fo:margin-left="0.6979in">
        <style:tab-stops>
          <style:tab-stop style:type="left" style:position="0in"/>
          <style:tab-stop style:type="left" style:position="1.9166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0.6979in"/>
          <style:tab-stop style:type="left" style:position="2.6145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0.6979in"/>
          <style:tab-stop style:type="left" style:position="2.6145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Expt:8</text:p>
      <text:p text:style-name="Normal">Q1.<text:s/>write a python program to create file in python and some data</text:p>
      <text:p text:style-name="Normal">Code:</text:p>
      <text:p text:style-name="Normal"><text:tab/>#write a python program to create file in python and some data</text:p>
      <text:p text:style-name="P2">file=open("abc.txt","w")</text:p>
      <text:p text:style-name="P3">file.write("gauresh")</text:p>
      <text:p text:style-name="P4">file.close()</text:p>
      <text:p text:style-name="Normal">output:</text:p>
      <text:p text:style-name="Normal"><text:tab/><draw:frame draw:style-name="a0" draw:name="Picture 1" text:anchor-type="as-char" svg:x="0in" svg:y="0in" svg:width="6.26806in" svg:height="0.6590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P5"><text:tab/></text:p>
      <text:p text:style-name="P6"/>
      <text:soft-page-break/>
      <text:p text:style-name="P7">Q2.read a data from file using python</text:p>
      <text:p text:style-name="P8">Code:</text:p>
      <text:p text:style-name="P9"><text:tab/>file=open("abc.txt","r")</text:p>
      <text:p text:style-name="P10">a=file.read()</text:p>
      <text:p text:style-name="P11">print(a)</text:p>
      <text:p text:style-name="P12">file.close()</text:p>
      <text:p text:style-name="P13">output:</text:p>
      <text:p text:style-name="P14"><text:tab/><draw:frame draw:style-name="a1" draw:name="Picture 1" text:anchor-type="as-char" svg:x="0in" svg:y="0in" svg:width="6.26806in" svg:height="1.06875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P15"><text:tab/></text:p>
      <text:p text:style-name="P16"/>
      <text:soft-page-break/>
      <text:p text:style-name="P17">Q3.write a data in file using user input in python.</text:p>
      <text:p text:style-name="P18">Code:</text:p>
      <text:p text:style-name="P19"><text:tab/>file=open("abc1.txt","w")</text:p>
      <text:p text:style-name="P20">a=input("enter a data: ")</text:p>
      <text:p text:style-name="P21">file.write(a)</text:p>
      <text:p text:style-name="P22">file.close()</text:p>
      <text:p text:style-name="P23">output:</text:p>
      <text:p text:style-name="P24"><text:tab/><draw:frame draw:style-name="a2" draw:name="Picture 1" text:anchor-type="as-char" svg:x="0in" svg:y="0in" svg:width="6.26806in" svg:height="0.66042in" style:rel-width="scale" style:rel-height="scale"><draw:image xlink:href="media/image3.png" xlink:type="simple" xlink:show="embed" xlink:actuate="onLoad"/><svg:title/><svg:desc/></draw:frame></text:p>
      <text:p text:style-name="P25"/>
      <text:soft-page-break/>
      <text:p text:style-name="P26">Q4.Translator in python</text:p>
      <text:p text:style-name="P27">Code:</text:p>
      <text:p text:style-name="P28"><text:tab/>from googletrans import Translator</text:p>
      <text:p text:style-name="P29">translator = Translator()</text:p>
      <text:p text:style-name="P30">text = input("Enter Text:")</text:p>
      <text:p text:style-name="P31">language=input("select language : ")</text:p>
      <text:p text:style-name="P32">translated=translator.translate(text,dest=language)</text:p>
      <text:p text:style-name="P33">print("Original Text:", text)</text:p>
      <text:p text:style-name="P34">print("Translated Text:", translated.text)<text:tab/></text:p>
      <text:p text:style-name="P35">output:</text:p>
      <text:p text:style-name="P36"><text:tab/><draw:frame draw:style-name="a3" draw:name="Picture 1" text:anchor-type="as-char" svg:x="0in" svg:y="0in" svg:width="6.26806in" svg:height="0.87361in" style:rel-width="scale" style:rel-height="scale"><draw:image xlink:href="media/image4.png" xlink:type="simple" xlink:show="embed" xlink:actuate="onLoad"/><svg:title/><svg:desc/></draw:frame><text:tab/></text:p>
      <text:p text:style-name="P37"/>
      <text:soft-page-break/>
      <text:p text:style-name="P38">Q5 Sentiment</text:p>
      <text:p text:style-name="P39">Code :</text:p>
      <text:p text:style-name="P40"><text:tab/>from textblob import TextBlob</text:p>
      <text:p text:style-name="P41">text = input("Enter a sentence: ")</text:p>
      <text:p text:style-name="P42">analysis = TextBlob(text)</text:p>
      <text:p text:style-name="P43">polarity = analysis.sentiment.polarity</text:p>
      <text:p text:style-name="P44">if polarity &gt; 0:</text:p>
      <text:p text:style-name="P45"><text:s text:c="4"/>print("Sentiment: Positive<text:s/><text:span text:style-name="T46">😊</text:span>")</text:p>
      <text:p text:style-name="P47">elif polarity &lt; 0:</text:p>
      <text:p text:style-name="P48"><text:s text:c="4"/>print("Sentiment: Negative<text:s/><text:span text:style-name="T49">😞</text:span>")</text:p>
      <text:p text:style-name="P50">else:</text:p>
      <text:p text:style-name="P51"><text:s text:c="4"/>print("Sentiment: Neutral<text:s/><text:span text:style-name="T52">😐</text:span>")</text:p>
      <text:p text:style-name="P53">print("Polarity Score:", polarity)</text:p>
      <text:p text:style-name="P54">output:</text:p>
      <text:p text:style-name="P55"><text:tab/><draw:frame draw:style-name="a4" draw:name="Picture 1" text:anchor-type="as-char" svg:x="0in" svg:y="0in" svg:width="6.26806in" svg:height="0.90486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resh Gaonkar</meta:initial-creator>
    <dc:creator>Gauresh Gaonkar</dc:creator>
    <meta:creation-date>2026-03-13T18:55:00Z</meta:creation-date>
    <dc:date>2026-03-13T19:15:00Z</dc:date>
    <meta:template xlink:href="Normal" xlink:type="simple"/>
    <meta:editing-cycles>2</meta:editing-cycles>
    <meta:editing-duration>PT1200S</meta:editing-duration>
    <meta:document-statistic meta:page-count="5" meta:paragraph-count="2" meta:word-count="169" meta:character-count="1136" meta:row-count="8" meta:non-whitespace-character-count="969"/>
  </office:meta>
</office:document-meta>
</file>