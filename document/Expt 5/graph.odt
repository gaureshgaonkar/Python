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5in">
        <style:tab-stops/>
      </style:paragraph-properties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Normal" style:family="paragraph">
      <style:paragraph-properties fo:margin-left="0.5in">
        <style:tab-stops/>
      </style:paragraph-properties>
    </style:style>
    <style:style style:name="P7" style:parent-style-name="Normal" style:family="paragraph">
      <style:paragraph-properties fo:margin-left="0.5in">
        <style:tab-stops/>
      </style:paragraph-properties>
    </style:style>
    <style:style style:name="P8" style:parent-style-name="Normal" style:family="paragraph">
      <style:paragraph-properties>
        <style:tab-stops>
          <style:tab-stop style:type="left" style:position="2.6875in"/>
        </style:tab-stops>
      </style:paragraph-properties>
    </style:style>
    <style:style style:name="P9" style:parent-style-name="Normal" style:family="paragraph">
      <style:paragraph-properties fo:break-before="page"/>
    </style:style>
    <style:style style:name="P10" style:parent-style-name="Normal" style:family="paragraph">
      <style:paragraph-properties>
        <style:tab-stops>
          <style:tab-stop style:type="left" style:position="2.6875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2.6875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0.6562in"/>
        </style:tab-stops>
      </style:paragraph-properties>
    </style:style>
    <style:style style:name="P13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14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15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16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17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18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19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20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21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22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23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24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25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26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27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28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29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30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31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32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33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34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35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36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37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38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39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40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41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42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43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44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45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46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47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48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49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50" style:parent-style-name="Normal" style:family="paragraph">
      <style:paragraph-properties fo:margin-left="0.6562in">
        <style:tab-stops>
          <style:tab-stop style:type="left" style:position="0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0.6562in"/>
        </style:tab-stops>
      </style:paragraph-properties>
    </style:style>
    <style:style style:name="P52" style:parent-style-name="Normal" style:family="paragraph">
      <style:paragraph-properties fo:text-align="center">
        <style:tab-stops>
          <style:tab-stop style:type="left" style:position="0.6562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1.9895in"/>
        </style:tab-stops>
      </style:paragraph-properties>
    </style:style>
    <style:style style:name="P54" style:parent-style-name="Normal" style:family="paragraph">
      <style:paragraph-properties fo:break-before="page"/>
    </style:style>
    <style:style style:name="P55" style:parent-style-name="Normal" style:family="paragraph">
      <style:paragraph-properties>
        <style:tab-stops>
          <style:tab-stop style:type="left" style:position="1.9895in"/>
        </style:tab-stops>
      </style:paragraph-properties>
    </style:style>
    <style:style style:name="P56" style:parent-style-name="Normal" style:family="paragraph">
      <style:paragraph-properties>
        <style:tab-stops>
          <style:tab-stop style:type="left" style:position="1.9895in"/>
        </style:tab-stops>
      </style:paragraph-properties>
    </style:style>
    <style:style style:name="P57" style:parent-style-name="Normal" style:family="paragraph">
      <style:paragraph-properties>
        <style:tab-stops>
          <style:tab-stop style:type="left" style:position="0.6458in"/>
          <style:tab-stop style:type="left" style:position="1.9895in"/>
        </style:tab-stops>
      </style:paragraph-properties>
    </style:style>
    <style:style style:name="P58" style:parent-style-name="Normal" style:family="paragraph">
      <style:paragraph-properties>
        <style:tab-stops>
          <style:tab-stop style:type="left" style:position="0.6458in"/>
          <style:tab-stop style:type="left" style:position="1.9895in"/>
        </style:tab-stops>
      </style:paragraph-properties>
    </style:style>
    <style:style style:name="P59" style:parent-style-name="Normal" style:family="paragraph">
      <style:paragraph-properties fo:margin-left="0.6458in">
        <style:tab-stops>
          <style:tab-stop style:type="left" style:position="0in"/>
          <style:tab-stop style:type="left" style:position="1.3437in"/>
        </style:tab-stops>
      </style:paragraph-properties>
    </style:style>
    <style:style style:name="P60" style:parent-style-name="Normal" style:family="paragraph">
      <style:paragraph-properties fo:margin-left="0.6458in">
        <style:tab-stops>
          <style:tab-stop style:type="left" style:position="0in"/>
          <style:tab-stop style:type="left" style:position="1.3437in"/>
        </style:tab-stops>
      </style:paragraph-properties>
    </style:style>
    <style:style style:name="P61" style:parent-style-name="Normal" style:family="paragraph">
      <style:paragraph-properties fo:margin-left="0.6458in">
        <style:tab-stops>
          <style:tab-stop style:type="left" style:position="0in"/>
          <style:tab-stop style:type="left" style:position="1.3437in"/>
        </style:tab-stops>
      </style:paragraph-properties>
    </style:style>
    <style:style style:name="P62" style:parent-style-name="Normal" style:family="paragraph">
      <style:paragraph-properties fo:margin-left="0.6458in">
        <style:tab-stops>
          <style:tab-stop style:type="left" style:position="0in"/>
          <style:tab-stop style:type="left" style:position="1.3437in"/>
        </style:tab-stops>
      </style:paragraph-properties>
    </style:style>
    <style:style style:name="P63" style:parent-style-name="Normal" style:family="paragraph">
      <style:paragraph-properties fo:margin-left="0.6458in">
        <style:tab-stops>
          <style:tab-stop style:type="left" style:position="0in"/>
          <style:tab-stop style:type="left" style:position="1.3437in"/>
        </style:tab-stops>
      </style:paragraph-properties>
    </style:style>
    <style:style style:name="P64" style:parent-style-name="Normal" style:family="paragraph">
      <style:paragraph-properties fo:margin-left="0.6458in">
        <style:tab-stops>
          <style:tab-stop style:type="left" style:position="0in"/>
          <style:tab-stop style:type="left" style:position="1.3437in"/>
        </style:tab-stops>
      </style:paragraph-properties>
    </style:style>
    <style:style style:name="P65" style:parent-style-name="Normal" style:family="paragraph">
      <style:paragraph-properties fo:margin-left="0.6458in">
        <style:tab-stops>
          <style:tab-stop style:type="left" style:position="0in"/>
          <style:tab-stop style:type="left" style:position="1.3437in"/>
        </style:tab-stops>
      </style:paragraph-properties>
    </style:style>
    <style:style style:name="P66" style:parent-style-name="Normal" style:family="paragraph">
      <style:paragraph-properties fo:margin-left="0.6458in">
        <style:tab-stops>
          <style:tab-stop style:type="left" style:position="0in"/>
          <style:tab-stop style:type="left" style:position="1.3437in"/>
        </style:tab-stops>
      </style:paragraph-properties>
    </style:style>
    <style:style style:name="P67" style:parent-style-name="Normal" style:family="paragraph">
      <style:paragraph-properties fo:margin-left="0.6458in">
        <style:tab-stops>
          <style:tab-stop style:type="left" style:position="0in"/>
          <style:tab-stop style:type="left" style:position="1.3437in"/>
        </style:tab-stops>
      </style:paragraph-properties>
    </style:style>
    <style:style style:name="P68" style:parent-style-name="Normal" style:family="paragraph">
      <style:paragraph-properties fo:margin-left="0.6458in">
        <style:tab-stops>
          <style:tab-stop style:type="left" style:position="0in"/>
          <style:tab-stop style:type="left" style:position="1.3437in"/>
        </style:tab-stops>
      </style:paragraph-properties>
    </style:style>
    <style:style style:name="P69" style:parent-style-name="Normal" style:family="paragraph">
      <style:paragraph-properties fo:margin-left="0.6458in">
        <style:tab-stops>
          <style:tab-stop style:type="left" style:position="0in"/>
          <style:tab-stop style:type="left" style:position="1.3437in"/>
        </style:tab-stops>
      </style:paragraph-properties>
    </style:style>
    <style:style style:name="P70" style:parent-style-name="Normal" style:family="paragraph">
      <style:paragraph-properties fo:margin-left="0.6458in">
        <style:tab-stops>
          <style:tab-stop style:type="left" style:position="0in"/>
          <style:tab-stop style:type="left" style:position="1.3437in"/>
        </style:tab-stops>
      </style:paragraph-properties>
    </style:style>
    <style:style style:name="P71" style:parent-style-name="Normal" style:family="paragraph">
      <style:paragraph-properties>
        <style:tab-stops>
          <style:tab-stop style:type="left" style:position="0.6458in"/>
          <style:tab-stop style:type="left" style:position="1.9895in"/>
        </style:tab-stops>
      </style:paragraph-properties>
    </style:style>
    <style:style style:name="P72" style:parent-style-name="Normal" style:family="paragraph">
      <style:paragraph-properties fo:text-align="center">
        <style:tab-stops>
          <style:tab-stop style:type="left" style:position="0.6458in"/>
          <style:tab-stop style:type="left" style:position="1.9895in"/>
        </style:tab-stops>
      </style:paragraph-properties>
    </style:style>
    <style:style style:name="P73" style:parent-style-name="Normal" style:family="paragraph">
      <style:paragraph-properties fo:margin-left="0.6458in">
        <style:tab-stops>
          <style:tab-stop style:type="left" style:position="0in"/>
          <style:tab-stop style:type="left" style:position="1.3437in"/>
        </style:tab-stops>
      </style:paragraph-properties>
    </style:style>
    <style:style style:name="P74" style:parent-style-name="Normal" style:family="paragraph">
      <style:paragraph-properties fo:margin-left="0.6458in">
        <style:tab-stops>
          <style:tab-stop style:type="left" style:position="0in"/>
          <style:tab-stop style:type="left" style:position="1.3437in"/>
        </style:tab-stops>
      </style:paragraph-properties>
    </style:style>
    <style:style style:name="P75" style:parent-style-name="Normal" style:family="paragraph">
      <style:paragraph-properties fo:break-before="page"/>
      <style:text-properties fo:hyphenate="true"/>
    </style:style>
    <style:style style:name="P76" style:parent-style-name="Normal" style:family="paragraph">
      <style:paragraph-properties fo:margin-left="0.6458in">
        <style:tab-stops>
          <style:tab-stop style:type="left" style:position="0in"/>
          <style:tab-stop style:type="left" style:position="1.3437in"/>
        </style:tab-stops>
      </style:paragraph-properties>
    </style:style>
    <style:style style:name="P77" style:parent-style-name="Normal" style:family="paragraph">
      <style:paragraph-properties fo:margin-left="0.6458in">
        <style:tab-stops>
          <style:tab-stop style:type="left" style:position="0in"/>
          <style:tab-stop style:type="left" style:position="1.3437in"/>
        </style:tab-stops>
      </style:paragraph-properties>
    </style:style>
    <style:style style:name="P78" style:parent-style-name="Normal" style:family="paragraph">
      <style:paragraph-properties fo:margin-left="0.6458in">
        <style:tab-stops>
          <style:tab-stop style:type="left" style:position="0in"/>
          <style:tab-stop style:type="left" style:position="0.5416in"/>
          <style:tab-stop style:type="left" style:position="1.3437in"/>
        </style:tab-stops>
      </style:paragraph-properties>
    </style:style>
    <style:style style:name="P79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80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81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82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83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84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85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86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87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88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89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90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91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92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93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94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95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96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97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98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99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00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01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02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03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04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05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06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07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08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09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10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11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12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13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14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15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16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17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18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19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20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21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22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23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24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25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26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27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28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29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30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31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32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33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34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35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36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37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38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39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40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41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42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43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44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45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46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47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48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49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50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51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52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53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54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55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56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57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58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59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60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61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62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63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64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65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66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67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68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69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70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71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72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73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74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75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76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77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78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79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80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81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82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83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84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85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86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87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88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89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90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91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92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93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94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95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96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97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98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199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00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01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02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03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04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05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06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07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08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09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10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11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12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13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14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15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16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17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18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19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20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21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22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name="P223" style:parent-style-name="Normal" style:family="paragraph">
      <style:paragraph-properties>
        <style:tab-stops>
          <style:tab-stop style:type="left" style:position="0.6458in"/>
          <style:tab-stop style:type="left" style:position="1.1875in"/>
          <style:tab-stop style:type="left" style:position="1.9895in"/>
        </style:tab-stops>
      </style:paragraph-properties>
    </style:style>
    <style:style style:name="P224" style:parent-style-name="Normal" style:family="paragraph">
      <style:paragraph-properties>
        <style:tab-stops>
          <style:tab-stop style:type="left" style:position="0.6458in"/>
          <style:tab-stop style:type="left" style:position="1.1875in"/>
          <style:tab-stop style:type="left" style:position="1.9895in"/>
        </style:tab-stops>
      </style:paragraph-properties>
    </style:style>
    <style:style style:name="P225" style:parent-style-name="Normal" style:family="paragraph">
      <style:paragraph-properties fo:margin-left="1.1875in">
        <style:tab-stops>
          <style:tab-stop style:type="left" style:position="-0.5416in"/>
          <style:tab-stop style:type="left" style:position="0in"/>
          <style:tab-stop style:type="left" style:position="0.802in"/>
        </style:tab-stops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Q1.graph<text:s/></text:p>
      <text:p text:style-name="Normal">Code:</text:p>
      <text:p text:style-name="Normal"><text:tab/>import turtle</text:p>
      <text:p text:style-name="P2">t=turtle.Turtle()</text:p>
      <text:p text:style-name="P3">t.speed(10)</text:p>
      <text:p text:style-name="P4">for i in range(1,40):</text:p>
      <text:p text:style-name="P5">    t.circle(100)</text:p>
      <text:p text:style-name="P6">    t.right(10)</text:p>
      <text:p text:style-name="P7">    t.forward(10)</text:p>
      <text:p text:style-name="Normal">   <text:s/></text:p>
      <text:p text:style-name="Normal"/>
      <text:p text:style-name="Normal"/>
      <text:p text:style-name="Normal">Output:</text:p>
      <text:p text:style-name="Normal"><text:tab/><text:tab/><draw:frame draw:style-name="a0" draw:name="Picture 1" text:anchor-type="as-char" svg:x="0in" svg:y="0in" svg:width="3.37222in" svg:height="2.9375in" style:rel-width="scale" style:rel-height="scale"><draw:image xlink:href="media/image1.png" xlink:type="simple" xlink:show="embed" xlink:actuate="onLoad"/><svg:title/><svg:desc/></draw:frame></text:p>
      <text:p text:style-name="P8"><text:tab/></text:p>
      <text:p text:style-name="P9"/>
      <text:p text:style-name="P10">Q2.men graph</text:p>
      <text:p text:style-name="P11">Code:</text:p>
      <text:p text:style-name="P12"><text:tab/>mport turtle</text:p>
      <text:p text:style-name="P13">t=turtle.Turtle()</text:p>
      <text:p text:style-name="P14">print("What you want to draw")</text:p>
      <text:p text:style-name="P15">print("1.men")</text:p>
      <text:p text:style-name="P16">print("2.circle")</text:p>
      <text:p text:style-name="P17">t.speed(10)</text:p>
      <text:p text:style-name="P18">t.circle(100)</text:p>
      <text:p text:style-name="P19">t.right(90)</text:p>
      <text:p text:style-name="P20">t.forward(200)</text:p>
      <text:p text:style-name="P21">t.right(45)</text:p>
      <text:p text:style-name="P22">t.forward(100)</text:p>
      <text:p text:style-name="P23">t.backward(100)</text:p>
      <text:p text:style-name="P24">t.left(90)</text:p>
      <text:p text:style-name="P25">t.forward(100)</text:p>
      <text:p text:style-name="P26">t.backward(100)</text:p>
      <text:p text:style-name="P27">t.left(135)</text:p>
      <text:p text:style-name="P28">t.forward(140)</text:p>
      <text:p text:style-name="P29">t.left(45)</text:p>
      <text:p text:style-name="P30">t.forward(100)</text:p>
      <text:p text:style-name="P31">t.backward(100)</text:p>
      <text:p text:style-name="P32">t.right(90)</text:p>
      <text:p text:style-name="P33">t.forward(100)</text:p>
      <text:p text:style-name="P34">t.penup()</text:p>
      <text:p text:style-name="P35">t.left(52)</text:p>
      <text:p text:style-name="P36">t.forward(100)</text:p>
      <text:soft-page-break/>
      <text:p text:style-name="P37">t.pendown()</text:p>
      <text:p text:style-name="P38">t.circle(20)</text:p>
      <text:p text:style-name="P39">t.penup()</text:p>
      <text:p text:style-name="P40">t.left(72)</text:p>
      <text:p text:style-name="P41">t.forward(90)</text:p>
      <text:p text:style-name="P42">t.pendown()</text:p>
      <text:p text:style-name="P43">t.circle(20)</text:p>
      <text:p text:style-name="P44">t.penup()</text:p>
      <text:p text:style-name="P45">t.left(90)</text:p>
      <text:p text:style-name="P46">t.forward(90)</text:p>
      <text:p text:style-name="P47">t.pendown()</text:p>
      <text:p text:style-name="P48">t.left(100)</text:p>
      <text:p text:style-name="P49">t.forward(100)</text:p>
      <text:p text:style-name="P50"/>
      <text:p text:style-name="P51">output:</text:p>
      <text:p text:style-name="P52"><draw:frame draw:style-name="a1" draw:name="Picture 1" text:anchor-type="as-char" svg:x="0in" svg:y="0in" svg:width="4.36458in" svg:height="3.1875in" style:rel-width="scale" style:rel-height="scale"><draw:image xlink:href="media/image2.png" xlink:type="simple" xlink:show="embed" xlink:actuate="onLoad"/><svg:title/><svg:desc/></draw:frame></text:p>
      <text:p text:style-name="Normal"/>
      <text:p text:style-name="P53"><text:tab/></text:p>
      <text:p text:style-name="P54"/>
      <text:p text:style-name="P55">Q3.test</text:p>
      <text:p text:style-name="P56">Code:</text:p>
      <text:p text:style-name="P57"><text:tab/>import turtle</text:p>
      <text:p text:style-name="P58"><text:tab/>t=turtle.Turtle()</text:p>
      <text:p text:style-name="P59">t.speed(3)</text:p>
      <text:p text:style-name="P60">t.circle(100)</text:p>
      <text:p text:style-name="P61">t.penup()</text:p>
      <text:p text:style-name="P62">t.forward(100)</text:p>
      <text:p text:style-name="P63">t.pendown()</text:p>
      <text:p text:style-name="P64">t.forward(100)</text:p>
      <text:p text:style-name="P65">t.right(90)</text:p>
      <text:p text:style-name="P66">t.forward(100)</text:p>
      <text:p text:style-name="P67">t.right(90)</text:p>
      <text:p text:style-name="P68">t.forward(100)</text:p>
      <text:p text:style-name="P69">t.right(90)</text:p>
      <text:p text:style-name="P70">t.forward(100)</text:p>
      <text:p text:style-name="P71">output:</text:p>
      <text:p text:style-name="P72"><draw:frame draw:style-name="a2" draw:name="Picture 1" text:anchor-type="as-char" svg:x="0in" svg:y="0in" svg:width="2.88542in" svg:height="2.07292in" style:rel-width="scale" style:rel-height="scale"><draw:image xlink:href="media/image3.png" xlink:type="simple" xlink:show="embed" xlink:actuate="onLoad"/><svg:title/><svg:desc/></draw:frame></text:p>
      <text:p text:style-name="P73"/>
      <text:p text:style-name="P74"><text:tab/></text:p>
      <text:p text:style-name="P75"/>
      <text:soft-page-break/>
      <text:p text:style-name="P76">Q4.color in graph</text:p>
      <text:p text:style-name="P77">Code:</text:p>
      <text:p text:style-name="P78"><text:tab/>import turtle</text:p>
      <text:p text:style-name="P79">t=turtle.Turtle()</text:p>
      <text:p text:style-name="P80">t.speed(3)</text:p>
      <text:p text:style-name="P81">t.fillcolor("black")</text:p>
      <text:p text:style-name="P82">t.begin_fill()</text:p>
      <text:p text:style-name="P83">t.forward(100)</text:p>
      <text:p text:style-name="P84">t.right(90)</text:p>
      <text:p text:style-name="P85">t.forward(100)</text:p>
      <text:p text:style-name="P86">t.right(90)</text:p>
      <text:p text:style-name="P87">t.forward(100)</text:p>
      <text:p text:style-name="P88">t.right(90)</text:p>
      <text:p text:style-name="P89">t.forward(100)</text:p>
      <text:p text:style-name="P90">t.end_fill()</text:p>
      <text:p text:style-name="P91">t.clear()</text:p>
      <text:p text:style-name="P92">t.fillcolor("black")</text:p>
      <text:p text:style-name="P93">t.begin_fill()</text:p>
      <text:p text:style-name="P94">t.right(45)</text:p>
      <text:p text:style-name="P95">t.forward(100)</text:p>
      <text:p text:style-name="P96">t.right(90)</text:p>
      <text:p text:style-name="P97">t.forward(100)</text:p>
      <text:p text:style-name="P98">t.right(135)</text:p>
      <text:p text:style-name="P99">t.forward(150)</text:p>
      <text:p text:style-name="P100">t.end_fill()</text:p>
      <text:p text:style-name="P101">t.clear()</text:p>
      <text:p text:style-name="P102">t.fillcolor("black")</text:p>
      <text:p text:style-name="P103">t.begin_fill()</text:p>
      <text:soft-page-break/>
      <text:p text:style-name="P104">t.right(90)</text:p>
      <text:p text:style-name="P105">t.forward(50)</text:p>
      <text:p text:style-name="P106">t.right(90)</text:p>
      <text:p text:style-name="P107">t.forward(100)</text:p>
      <text:p text:style-name="P108">t.right(90)</text:p>
      <text:p text:style-name="P109">t.forward(50)</text:p>
      <text:p text:style-name="P110">t.right(90)</text:p>
      <text:p text:style-name="P111">t.forward(100)</text:p>
      <text:p text:style-name="P112">t.end_fill()</text:p>
      <text:p text:style-name="P113">t.clear()</text:p>
      <text:p text:style-name="P114">t.fillcolor("yellow")</text:p>
      <text:p text:style-name="P115">t.begin_fill()</text:p>
      <text:p text:style-name="P116">t.circle(80)</text:p>
      <text:p text:style-name="P117">t.end_fill()</text:p>
      <text:p text:style-name="P118">t.clear()</text:p>
      <text:p text:style-name="P119">t.color("blue")</text:p>
      <text:p text:style-name="P120">t.fillcolor("blue")</text:p>
      <text:p text:style-name="P121">t.begin_fill()</text:p>
      <text:p text:style-name="P122">t.right(45)</text:p>
      <text:p text:style-name="P123">t.forward(100)</text:p>
      <text:p text:style-name="P124">t.right(135)</text:p>
      <text:p text:style-name="P125">t.forward(100)</text:p>
      <text:p text:style-name="P126">t.right(135)</text:p>
      <text:p text:style-name="P127">t.forward(120)</text:p>
      <text:p text:style-name="P128">t.right(150)</text:p>
      <text:p text:style-name="P129">t.forward(120)</text:p>
      <text:p text:style-name="P130">t.right(150)</text:p>
      <text:p text:style-name="P131">t.forward(120)</text:p>
      <text:soft-page-break/>
      <text:p text:style-name="P132">t.end_fill()</text:p>
      <text:p text:style-name="P133">t.forward(100)</text:p>
      <text:p text:style-name="P134">t.color("blue")</text:p>
      <text:p text:style-name="P135">t.fillcolor("blue")</text:p>
      <text:p text:style-name="P136">t.begin_fill()</text:p>
      <text:p text:style-name="P137">t.right(45)</text:p>
      <text:p text:style-name="P138">t.forward(100)</text:p>
      <text:p text:style-name="P139">t.right(135)</text:p>
      <text:p text:style-name="P140">t.forward(100)</text:p>
      <text:p text:style-name="P141">t.right(135)</text:p>
      <text:p text:style-name="P142">t.forward(120)</text:p>
      <text:p text:style-name="P143">t.right(150)</text:p>
      <text:p text:style-name="P144">t.forward(120)</text:p>
      <text:p text:style-name="P145">t.right(150)</text:p>
      <text:p text:style-name="P146">t.forward(120)</text:p>
      <text:p text:style-name="P147">t.end_fill()</text:p>
      <text:p text:style-name="P148">t.forward(100)</text:p>
      <text:p text:style-name="P149">t.color("blue")</text:p>
      <text:p text:style-name="P150">t.fillcolor("blue")</text:p>
      <text:p text:style-name="P151">t.begin_fill()</text:p>
      <text:p text:style-name="P152">t.right(45)</text:p>
      <text:p text:style-name="P153">t.forward(100)</text:p>
      <text:p text:style-name="P154">t.right(135)</text:p>
      <text:p text:style-name="P155">t.forward(100)</text:p>
      <text:p text:style-name="P156">t.right(135)</text:p>
      <text:p text:style-name="P157">t.forward(120)</text:p>
      <text:p text:style-name="P158">t.right(150)</text:p>
      <text:p text:style-name="P159">t.forward(120)</text:p>
      <text:soft-page-break/>
      <text:p text:style-name="P160">t.right(150)</text:p>
      <text:p text:style-name="P161">t.forward(120)</text:p>
      <text:p text:style-name="P162">t.end_fill()</text:p>
      <text:p text:style-name="P163">t.forward(100)</text:p>
      <text:p text:style-name="P164">t.color("blue")</text:p>
      <text:p text:style-name="P165">t.fillcolor("blue")</text:p>
      <text:p text:style-name="P166">t.begin_fill()</text:p>
      <text:p text:style-name="P167">t.right(45)</text:p>
      <text:p text:style-name="P168">t.forward(100)</text:p>
      <text:p text:style-name="P169">t.right(135)</text:p>
      <text:p text:style-name="P170">t.forward(100)</text:p>
      <text:p text:style-name="P171">t.right(135)</text:p>
      <text:p text:style-name="P172">t.forward(120)</text:p>
      <text:p text:style-name="P173">t.right(150)</text:p>
      <text:p text:style-name="P174">t.forward(120)</text:p>
      <text:p text:style-name="P175">t.right(150)</text:p>
      <text:p text:style-name="P176">t.forward(120)</text:p>
      <text:p text:style-name="P177">t.end_fill()</text:p>
      <text:p text:style-name="P178">t.forward(100)</text:p>
      <text:p text:style-name="P179">t.color("blue")</text:p>
      <text:p text:style-name="P180">t.fillcolor("blue")</text:p>
      <text:p text:style-name="P181">t.begin_fill()</text:p>
      <text:p text:style-name="P182">t.right(45)</text:p>
      <text:p text:style-name="P183">t.forward(100)</text:p>
      <text:p text:style-name="P184">t.right(135)</text:p>
      <text:p text:style-name="P185">t.forward(100)</text:p>
      <text:p text:style-name="P186">t.right(135)</text:p>
      <text:p text:style-name="P187">t.forward(120)</text:p>
      <text:soft-page-break/>
      <text:p text:style-name="P188">t.right(150)</text:p>
      <text:p text:style-name="P189">t.forward(120)</text:p>
      <text:p text:style-name="P190">t.right(150)</text:p>
      <text:p text:style-name="P191">t.forward(120)</text:p>
      <text:p text:style-name="P192">t.end_fill()</text:p>
      <text:p text:style-name="P193">t.forward(100)</text:p>
      <text:p text:style-name="P194">t.color("blue")</text:p>
      <text:p text:style-name="P195">t.fillcolor("blue")</text:p>
      <text:p text:style-name="P196">t.begin_fill()</text:p>
      <text:p text:style-name="P197">t.right(45)</text:p>
      <text:p text:style-name="P198">t.forward(100)</text:p>
      <text:p text:style-name="P199">t.right(135)</text:p>
      <text:p text:style-name="P200">t.forward(100)</text:p>
      <text:p text:style-name="P201">t.right(135)</text:p>
      <text:p text:style-name="P202">t.forward(120)</text:p>
      <text:p text:style-name="P203">t.right(150)</text:p>
      <text:p text:style-name="P204">t.forward(120)</text:p>
      <text:p text:style-name="P205">t.right(150)</text:p>
      <text:p text:style-name="P206">t.forward(120)</text:p>
      <text:p text:style-name="P207">t.end_fill()</text:p>
      <text:p text:style-name="P208">t.forward(100)</text:p>
      <text:p text:style-name="P209">t.color("blue")</text:p>
      <text:p text:style-name="P210">t.fillcolor("blue")</text:p>
      <text:p text:style-name="P211">t.begin_fill()</text:p>
      <text:p text:style-name="P212">t.right(45)</text:p>
      <text:p text:style-name="P213">t.forward(100)</text:p>
      <text:p text:style-name="P214">t.right(135)</text:p>
      <text:p text:style-name="P215">t.forward(100)</text:p>
      <text:soft-page-break/>
      <text:p text:style-name="P216">t.right(135)</text:p>
      <text:p text:style-name="P217">t.forward(120)</text:p>
      <text:p text:style-name="P218">t.right(150)</text:p>
      <text:p text:style-name="P219">t.forward(120)</text:p>
      <text:p text:style-name="P220">t.right(150)</text:p>
      <text:p text:style-name="P221">t.forward(120)</text:p>
      <text:p text:style-name="P222">t.end_fill()</text:p>
      <text:p text:style-name="P223">output:</text:p>
      <text:p text:style-name="P224"><text:tab/><draw:frame draw:style-name="a3" draw:name="Picture 1" text:anchor-type="as-char" svg:x="0in" svg:y="0in" svg:width="6.26806in" svg:height="5.48611in" style:rel-width="scale" style:rel-height="scale"><draw:image xlink:href="media/image4.png" xlink:type="simple" xlink:show="embed" xlink:actuate="onLoad"/><svg:title/><svg:desc/></draw:frame><text:line-break/><text:line-break/><text:line-break/></text:p>
      <text:p text:style-name="P225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resh Gaonkar</meta:initial-creator>
    <dc:creator>Gauresh Gaonkar</dc:creator>
    <meta:creation-date>2026-03-13T19:21:00Z</meta:creation-date>
    <dc:date>2026-03-13T19:34:00Z</dc:date>
    <meta:template xlink:href="Normal" xlink:type="simple"/>
    <meta:editing-cycles>7</meta:editing-cycles>
    <meta:editing-duration>PT660S</meta:editing-duration>
    <meta:document-statistic meta:page-count="10" meta:paragraph-count="6" meta:word-count="457" meta:character-count="3060" meta:row-count="21" meta:non-whitespace-character-count="2609"/>
  </office:meta>
</office:document-meta>
</file>