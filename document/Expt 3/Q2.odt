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family="paragraph">
      <style:paragraph-properties fo:margin-left="0.5in">
        <style:tab-stops/>
      </style:paragraph-properties>
    </style:style>
    <style:style style:name="P14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2.wirte a python program to accept 10 number from user and print the count of enven number and odd.</text:p>
      <text:p text:style-name="Normal">Code :</text:p>
      <text:p text:style-name="P2">EC=0</text:p>
      <text:p text:style-name="P3">OC=0</text:p>
      <text:p text:style-name="P4">for i in range(0,10):</text:p>
      <text:p text:style-name="P5">    num=int(input("Enter a number:"))</text:p>
      <text:p text:style-name="P6">    if (num%2==0):</text:p>
      <text:p text:style-name="P7">       EC+=1</text:p>
      <text:p text:style-name="P8">    else :</text:p>
      <text:p text:style-name="P9">       OC+=1</text:p>
      <text:p text:style-name="P10">print("Even num are :",EC)</text:p>
      <text:p text:style-name="P11">print("odd num are :",OC)</text:p>
      <text:p text:style-name="P12"/>
      <text:p text:style-name="P13">output:</text:p>
      <text:p text:style-name="P14"><draw:frame draw:style-name="a0" draw:name="Picture 1" text:anchor-type="as-char" svg:x="0in" svg:y="0in" svg:width="6.26806in" svg:height="1.96181in" style:rel-width="scale" style:rel-height="scale"><draw:image xlink:href="media/image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3T07:42:00Z</meta:creation-date>
    <dc:date>2026-01-23T07:46:00Z</dc:date>
    <meta:template xlink:href="Normal" xlink:type="simple"/>
    <meta:editing-cycles>2</meta:editing-cycles>
    <meta:editing-duration>PT240S</meta:editing-duration>
    <meta:document-statistic meta:page-count="1" meta:paragraph-count="1" meta:word-count="44" meta:character-count="297" meta:row-count="2" meta:non-whitespace-character-count="254"/>
  </office:meta>
</office:document-meta>
</file>