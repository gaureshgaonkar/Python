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left="0.5in">
        <style:tab-stops/>
      </style:paragraph-properties>
    </style:style>
    <style:style style:name="P3" style:parent-style-name="Normal" style:family="paragraph">
      <style:paragraph-properties fo:margin-left="0.5in">
        <style:tab-stops/>
      </style:paragraph-properties>
    </style:style>
    <style:style style:name="P4" style:parent-style-name="Normal" style:family="paragraph">
      <style:paragraph-properties fo:margin-left="0.5in">
        <style:tab-stops/>
      </style:paragraph-properties>
    </style:style>
    <style:style style:name="P5" style:parent-style-name="Normal" style:family="paragraph">
      <style:paragraph-properties fo:margin-left="0.5in">
        <style:tab-stops/>
      </style:paragraph-properties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4.take a <text:s/>number from user and find its factorial</text:p>
      <text:p text:style-name="Normal">Code:</text:p>
      <text:p text:style-name="Normal"><text:tab/>num=int(input("Enter number:"))</text:p>
      <text:p text:style-name="P2">fact=1</text:p>
      <text:p text:style-name="P3">for i in range(1,num+1):</text:p>
      <text:p text:style-name="P4"><text:s text:c="4"/>fact=fact*i</text:p>
      <text:p text:style-name="P5">print("Factorial is",fact)</text:p>
      <text:p text:style-name="Normal">output:</text:p>
      <text:p text:style-name="Normal"><draw:frame draw:style-name="a0" draw:name="Picture 1" text:anchor-type="as-char" svg:x="0in" svg:y="0in" svg:width="6.26806in" svg:height="0.51319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auresh Gaonkar</meta:initial-creator>
    <dc:creator>Gauresh Gaonkar</dc:creator>
    <meta:creation-date>2026-01-23T07:59:00Z</meta:creation-date>
    <dc:date>2026-01-23T08:00:00Z</dc:date>
    <meta:template xlink:href="Normal" xlink:type="simple"/>
    <meta:editing-cycles>1</meta:editing-cycles>
    <meta:editing-duration>PT0S</meta:editing-duration>
    <meta:document-statistic meta:page-count="1" meta:paragraph-count="1" meta:word-count="25" meta:character-count="173" meta:row-count="1" meta:non-whitespace-character-count="149"/>
  </office:meta>
</office:document-meta>
</file>