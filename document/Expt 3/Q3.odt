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3. write a python program to make table of user input number</text:p>
      <text:p text:style-name="Normal">Code :</text:p>
      <text:p text:style-name="Normal"><text:tab/>a=int(input("Enter any number for make table:"))<text:s/></text:p>
      <text:p text:style-name="P2">for i in range(1,11):</text:p>
      <text:p text:style-name="Normal"><text:s text:c="4"/><text:tab/><text:tab/>print(a*i)</text:p>
      <text:p text:style-name="Normal">output :</text:p>
      <text:p text:style-name="Normal"><text:tab/><draw:frame draw:style-name="a0" draw:name="Picture 1" text:anchor-type="as-char" svg:x="0in" svg:y="0in" svg:width="6.26806in" svg:height="2.4097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23T07:46:00Z</meta:creation-date>
    <dc:date>2026-01-23T07:51:00Z</dc:date>
    <meta:template xlink:href="Normal" xlink:type="simple"/>
    <meta:editing-cycles>2</meta:editing-cycles>
    <meta:editing-duration>PT300S</meta:editing-duration>
    <meta:document-statistic meta:page-count="1" meta:paragraph-count="1" meta:word-count="25" meta:character-count="169" meta:row-count="1" meta:non-whitespace-character-count="145"/>
  </office:meta>
</office:document-meta>
</file>