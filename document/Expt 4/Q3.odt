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5in">
        <style:tab-stops/>
      </style:paragraph-properties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family="paragraph">
      <style:paragraph-properties fo:margin-left="0.5in">
        <style:tab-stops/>
      </style:paragraph-properties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P9" style:parent-style-name="Normal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3.<text:s/>Search for an element “4” in a list (linear search): digits=[3,5,2,6,8,4,9,12] if found print “number found” or “number not found”</text:p>
      <text:p text:style-name="Normal">Code:</text:p>
      <text:p text:style-name="Normal"><text:tab/>digits=[3,5,2,6,8,4,9,12]</text:p>
      <text:p text:style-name="P2">num=4</text:p>
      <text:p text:style-name="P3">for i in digits:</text:p>
      <text:p text:style-name="P4"><text:s text:c="4"/>if(i==num):</text:p>
      <text:p text:style-name="P5"><text:s text:c="8"/>print("found")</text:p>
      <text:p text:style-name="P6"><text:s text:c="4"/>else:</text:p>
      <text:p text:style-name="P7"><text:s text:c="8"/>print("not There")</text:p>
      <text:p text:style-name="P8">output:</text:p>
      <text:p text:style-name="P9"><draw:frame draw:style-name="a0" draw:name="Picture 1" text:anchor-type="as-char" svg:x="0in" svg:y="0in" svg:width="6.26806in" svg:height="1.3236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1-29T08:24:00Z</meta:creation-date>
    <dc:date>2026-01-29T08:29:00Z</dc:date>
    <meta:template xlink:href="Normal" xlink:type="simple"/>
    <meta:editing-cycles>1</meta:editing-cycles>
    <meta:editing-duration>PT300S</meta:editing-duration>
    <meta:document-statistic meta:page-count="1" meta:paragraph-count="1" meta:word-count="41" meta:character-count="275" meta:row-count="1" meta:non-whitespace-character-count="235"/>
  </office:meta>
</office:document-meta>
</file>