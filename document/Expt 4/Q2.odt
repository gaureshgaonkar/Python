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2.<text:s/>Count how many even and odd numbers are present in list : num=[3,5,2,6,8,4,9,12]</text:p>
      <text:p text:style-name="Normal">Code:</text:p>
      <text:p text:style-name="Normal"><text:tab/>num=[3,5,2,6,8,4,9,12]</text:p>
      <text:p text:style-name="P2">ecount=0</text:p>
      <text:p text:style-name="P3">ocount=0</text:p>
      <text:p text:style-name="P4">for i in num:</text:p>
      <text:p text:style-name="P5"><text:s text:c="4"/>if(i%2==0):</text:p>
      <text:p text:style-name="P6"><text:s text:c="8"/>ecount=ecount+1</text:p>
      <text:p text:style-name="P7"><text:s text:c="4"/>else:</text:p>
      <text:p text:style-name="P8"><text:s text:c="8"/>ocount=ocount+1</text:p>
      <text:p text:style-name="P9">print("even no is:",ecount)</text:p>
      <text:p text:style-name="P10">print("odd no is:",ocount)</text:p>
      <text:p text:style-name="Normal">output:</text:p>
      <text:p text:style-name="Normal"><text:tab/><draw:frame draw:style-name="a0" draw:name="Picture 1" text:anchor-type="as-char" svg:x="0in" svg:y="0in" svg:width="6.26806in" svg:height="0.42639in" style:rel-width="scale" style:rel-height="scale"><draw:image xlink:href="media/image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9T08:21:00Z</meta:creation-date>
    <dc:date>2026-01-29T08:23:00Z</dc:date>
    <meta:template xlink:href="Normal" xlink:type="simple"/>
    <meta:editing-cycles>1</meta:editing-cycles>
    <meta:editing-duration>PT120S</meta:editing-duration>
    <meta:document-statistic meta:page-count="1" meta:paragraph-count="1" meta:word-count="42" meta:character-count="286" meta:row-count="2" meta:non-whitespace-character-count="245"/>
  </office:meta>
</office:document-meta>
</file>