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family="paragraph">
      <style:paragraph-properties fo:margin-left="1in">
        <style:tab-stops/>
      </style:paragraph-properties>
    </style:style>
    <style:style style:name="P4" style:parent-style-name="ListParagraph" style:family="paragraph">
      <style:paragraph-properties fo:margin-left="1in">
        <style:tab-stops/>
      </style:paragraph-properties>
    </style:style>
    <style:style style:name="P5" style:parent-style-name="ListParagraph" style:family="paragraph">
      <style:paragraph-properties fo:margin-left="1in">
        <style:tab-stops/>
      </style:paragraph-properties>
    </style:style>
    <style:style style:name="P6" style:parent-style-name="ListParagraph" style:family="paragraph">
      <style:paragraph-properties fo:margin-left="1in">
        <style:tab-stops/>
      </style:paragraph-properties>
    </style:style>
    <style:style style:name="P7" style:parent-style-name="ListParagraph" style:family="paragraph">
      <style:paragraph-properties fo:margin-left="1in">
        <style:tab-stops/>
      </style:paragraph-properties>
    </style:style>
    <style:style style:name="P8" style:parent-style-name="ListParagraph" style:family="paragraph">
      <style:paragraph-properties fo:margin-left="1in">
        <style:tab-stops/>
      </style:paragraph-properties>
    </style:style>
    <style:style style:name="P9" style:parent-style-name="ListParagraph" style:family="paragraph">
      <style:paragraph-properties fo:margin-left="1in">
        <style:tab-stops/>
      </style:paragraph-properties>
    </style:style>
    <style:style style:name="P10" style:parent-style-name="ListParagraph" style:family="paragraph">
      <style:paragraph-properties fo:margin-left="1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Expt.4</text:p>
      <text:list text:style-name="LFO1" text:continue-numbering="true">
        <text:list-item>
          <text:p text:style-name="P2">Find the sum and average of elements in a mylist=[2,4,3,5,2,7,8,8,9]</text:p>
        </text:list-item>
      </text:list>
      <text:p text:style-name="ListParagraph">Code:</text:p>
      <text:p text:style-name="ListParagraph"><text:tab/>mylist=[2,4,3,5,2,7,8,8,9]</text:p>
      <text:p text:style-name="P3">total=0</text:p>
      <text:p text:style-name="P4">count=0</text:p>
      <text:p text:style-name="P5">for i in range(len(mylist)):</text:p>
      <text:p text:style-name="P6"><text:s text:c="15"/>total=total+mylist[i]</text:p>
      <text:p text:style-name="P7"><text:s text:c="15"/>count=count+1</text:p>
      <text:p text:style-name="P8">average=total/count</text:p>
      <text:p text:style-name="P9">print(total)</text:p>
      <text:p text:style-name="P10">print(average)</text:p>
      <text:p text:style-name="Normal"><text:tab/>output:</text:p>
      <text:p text:style-name="Normal"><text:tab/><text:tab/><draw:frame draw:style-name="a0" draw:name="Picture 1" text:anchor-type="as-char" svg:x="0in" svg:y="0in" svg:width="6.26806in" svg:height="0.43264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uresh Gaonkar</meta:initial-creator>
    <dc:creator>Gauresh Gaonkar</dc:creator>
    <meta:creation-date>2026-01-29T08:18:00Z</meta:creation-date>
    <dc:date>2026-01-29T08:21:00Z</dc:date>
    <meta:template xlink:href="Normal" xlink:type="simple"/>
    <meta:editing-cycles>1</meta:editing-cycles>
    <meta:editing-duration>PT180S</meta:editing-duration>
    <meta:document-statistic meta:page-count="1" meta:paragraph-count="1" meta:word-count="42" meta:character-count="281" meta:row-count="2" meta:non-whitespace-character-count="240"/>
  </office:meta>
</office:document-meta>
</file>